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5">
      <style:paragraph-properties fo:margin-top="0in" fo:margin-bottom="0.1965in" style:contextual-spacing="false"/>
    </style:style>
    <style:style style:name="P2" style:family="paragraph" style:parent-style-name="Preformatted_20_Text" style:list-style-name="L7">
      <style:paragraph-properties fo:margin-top="0in" fo:margin-bottom="0.1965in" style:contextual-spacing="false"/>
    </style:style>
    <style:style style:name="P3" style:family="paragraph" style:parent-style-name="Preformatted_20_Text" style:list-style-name="L9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 style:list-style-name="L11">
      <style:paragraph-properties fo:margin-top="0in" fo:margin-bottom="0.1965in" style:contextual-spacing="false"/>
    </style:style>
    <style:style style:name="P6" style:family="paragraph" style:parent-style-name="Preformatted_20_Text" style:list-style-name="L13">
      <style:paragraph-properties fo:margin-top="0in" fo:margin-bottom="0.1965in" style:contextual-spacing="false"/>
    </style:style>
    <style:style style:name="P7" style:family="paragraph" style:parent-style-name="Preformatted_20_Text" style:list-style-name="L17">
      <style:paragraph-properties fo:margin-top="0in" fo:margin-bottom="0.1965in" style:contextual-spacing="false"/>
    </style:style>
    <style:style style:name="P8" style:family="paragraph" style:parent-style-name="Preformatted_20_Text" style:list-style-name="L19">
      <style:paragraph-properties fo:margin-top="0in" fo:margin-bottom="0.1965in" style:contextual-spacing="false"/>
    </style:style>
    <style:style style:name="P9" style:family="paragraph" style:parent-style-name="Preformatted_20_Text" style:list-style-name="L21">
      <style:paragraph-properties fo:margin-top="0in" fo:margin-bottom="0.1965in" style:contextual-spacing="false"/>
    </style:style>
    <style:style style:name="P10" style:family="paragraph" style:parent-style-name="Preformatted_20_Text" style:list-style-name="L24">
      <style:paragraph-properties fo:margin-top="0in" fo:margin-bottom="0.1965in" style:contextual-spacing="false"/>
    </style:style>
    <style:style style:name="P11" style:family="paragraph" style:parent-style-name="Preformatted_20_Text" style:list-style-name="L26">
      <style:paragraph-properties fo:margin-top="0in" fo:margin-bottom="0.1965in" style:contextual-spacing="false"/>
    </style:style>
    <style:style style:name="P12" style:family="paragraph" style:parent-style-name="Preformatted_20_Text" style:list-style-name="L29">
      <style:paragraph-properties fo:margin-top="0in" fo:margin-bottom="0.1965in" style:contextual-spacing="false"/>
    </style:style>
    <style:style style:name="P13" style:family="paragraph" style:parent-style-name="Preformatted_20_Text" style:list-style-name="L31"/>
    <style:style style:name="P14" style:family="paragraph" style:parent-style-name="Preformatted_20_Text" style:list-style-name="L31">
      <style:paragraph-properties fo:margin-top="0in" fo:margin-bottom="0.1965in" style:contextual-spacing="false"/>
    </style:style>
    <style:style style:name="P15" style:family="paragraph" style:parent-style-name="Preformatted_20_Text" style:list-style-name="L33"/>
    <style:style style:name="P16" style:family="paragraph" style:parent-style-name="Preformatted_20_Text" style:list-style-name="L33">
      <style:paragraph-properties fo:margin-top="0in" fo:margin-bottom="0.1965in" style:contextual-spacing="fals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>
      <style:paragraph-properties fo:margin-top="0in" fo:margin-bottom="0in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in" fo:margin-bottom="0in" style:contextual-spacing="false"/>
    </style:style>
    <style:style style:name="P26" style:family="paragraph" style:parent-style-name="Text_20_body" style:list-style-name="L4">
      <style:paragraph-properties fo:margin-top="0in" fo:margin-bottom="0in" style:contextual-spacing="false"/>
    </style:style>
    <style:style style:name="P27" style:family="paragraph" style:parent-style-name="Text_20_body" style:list-style-name="L4">
      <style:paragraph-properties fo:margin-left="0in" fo:margin-right="0in" fo:text-indent="0in" style:auto-text-indent="false"/>
    </style:style>
    <style:style style:name="P28" style:family="paragraph" style:parent-style-name="Text_20_body" style:list-style-name="L6">
      <style:paragraph-properties fo:margin-top="0in" fo:margin-bottom="0in" style:contextual-spacing="false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>
      <style:paragraph-properties fo:margin-left="0in" fo:margin-right="0in" fo:text-indent="0in" style:auto-text-indent="false"/>
    </style:style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0">
      <style:paragraph-properties fo:margin-left="0in" fo:margin-right="0in" fo:text-indent="0in" style:auto-text-indent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left="0in" fo:margin-right="0in" fo:text-indent="0in" style:auto-text-indent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in" fo:margin-bottom="0in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8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>
      <style:paragraph-properties fo:margin-left="0in" fo:margin-right="0in" fo:text-indent="0in" style:auto-text-indent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left="0in" fo:margin-right="0in" fo:text-indent="0in" style:auto-text-indent="false"/>
    </style:style>
    <style:style style:name="P46" style:family="paragraph" style:parent-style-name="Text_20_body" style:list-style-name="L25"/>
    <style:style style:name="P47" style:family="paragraph" style:parent-style-name="Text_20_body" style:list-style-name="L26"/>
    <style:style style:name="P48" style:family="paragraph" style:parent-style-name="Text_20_body" style:list-style-name="L27">
      <style:paragraph-properties fo:margin-top="0in" fo:margin-bottom="0in" style:contextual-spacing="false"/>
    </style:style>
    <style:style style:name="P49" style:family="paragraph" style:parent-style-name="Text_20_body" style:list-style-name="L28">
      <style:paragraph-properties fo:margin-top="0in" fo:margin-bottom="0in" style:contextual-spacing="false"/>
    </style:style>
    <style:style style:name="P50" style:family="paragraph" style:parent-style-name="Text_20_body" style:list-style-name="L28">
      <style:paragraph-properties fo:margin-left="0in" fo:margin-right="0in" fo:text-indent="0in" style:auto-text-indent="false"/>
    </style:style>
    <style:style style:name="P51" style:family="paragraph" style:parent-style-name="Text_20_body" style:list-style-name="L30">
      <style:paragraph-properties fo:margin-top="0in" fo:margin-bottom="0in" style:contextual-spacing="false"/>
    </style:style>
    <style:style style:name="P52" style:family="paragraph" style:parent-style-name="Text_20_body" style:list-style-name="L32">
      <style:paragraph-properties fo:margin-top="0in" fo:margin-bottom="0in" style:contextual-spacing="false"/>
    </style:style>
    <style:style style:name="P53" style:family="paragraph" style:parent-style-name="Text_20_body" style:list-style-name="L32">
      <style:paragraph-properties fo:margin-left="0in" fo:margin-right="0in" fo:text-indent="0in" style:auto-text-indent="false"/>
    </style:style>
    <style:style style:name="P54" style:family="paragraph" style:parent-style-name="Text_20_body" style:list-style-name="L33"/>
    <style:style style:name="P55" style:family="paragraph" style:parent-style-name="Text_20_body" style:list-style-name="L34"/>
    <style:style style:name="P56" style:family="paragraph" style:parent-style-name="Text_20_body" style:list-style-name="L35"/>
    <style:style style:name="P57" style:family="paragraph" style:parent-style-name="Text_20_body" style:list-style-name="L36"/>
    <style:style style:name="P58" style:family="paragraph" style:parent-style-name="Text_20_body" style:list-style-name="L37"/>
    <style:style style:name="P59" style:family="paragraph" style:parent-style-name="Text_20_body" style:list-style-name="L37">
      <style:paragraph-properties fo:margin-top="0in" fo:margin-bottom="0in" style:contextual-spacing="false"/>
    </style:style>
    <style:style style:name="P60" style:family="paragraph" style:parent-style-name="Text_20_body" style:list-style-name="L38"/>
    <style:style style:name="P61" style:family="paragraph" style:parent-style-name="Text_20_body" style:list-style-name="L39"/>
    <style:style style:name="P62" style:family="paragraph" style:parent-style-name="Text_20_body" style:list-style-name="L39">
      <style:paragraph-properties fo:margin-top="0in" fo:margin-bottom="0in" style:contextual-spacing="false"/>
    </style:style>
    <style:style style:name="P63" style:family="paragraph" style:parent-style-name="Text_20_body" style:list-style-name="L40"/>
    <style:style style:name="P64" style:family="paragraph" style:parent-style-name="Text_20_body" style:list-style-name="L41"/>
    <style:style style:name="P65" style:family="paragraph" style:parent-style-name="Text_20_body" style:list-style-name="L41">
      <style:paragraph-properties fo:margin-top="0in" fo:margin-bottom="0in" style:contextual-spacing="false"/>
    </style:style>
    <style:style style:name="P66" style:family="paragraph" style:parent-style-name="Text_20_body" style:list-style-name="L42"/>
    <style:style style:name="P67" style:family="paragraph" style:parent-style-name="Text_20_body" style:list-style-name="L42">
      <style:paragraph-properties fo:margin-top="0in" fo:margin-bottom="0in" style:contextual-spacing="false"/>
    </style:style>
    <style:style style:name="T1" style:family="text">
      <style:text-properties officeooo:rsid="000e95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ual de Sistema</text:h>
      <text:p text:style-name="Text_20_body"><text:span text:style-name="Strong_20_Emphasis">Proyecto:</text:span> UPTP-336-Proyecto-II/Lufra-2020<text:line-break/><text:span text:style-name="Strong_20_Emphasis">Descripción:</text:span> Grupo 1<text:line-break/><text:span text:style-name="Strong_20_Emphasis">Repositorio:</text:span> <text:a xlink:type="simple" xlink:href="https://github.com/UPTP-336-Proyecto-II/Lufra-2020" office:target-frame-name="_blank" xlink:show="new" text:style-name="Internet_20_link" text:visited-style-name="Visited_20_Internet_20_Link">https://github.com/UPTP-336-Proyecto-II/Lufra-2020</text:a></text:p>
      <text:p text:style-name="Standard"/>
      <text:h text:style-name="Heading_20_2" text:outline-level="2">1. Información General del Sistema</text:h>
      <text:list text:style-name="L1">
        <text:list-item>
          <text:p text:style-name="P20"><text:span text:style-name="Strong_20_Emphasis">Lenguajes principales:</text:span> </text:p>
          <text:list>
            <text:list-item>
              <text:p text:style-name="P20">JavaScript (33.3%) </text:p>
            </text:list-item>
            <text:list-item>
              <text:p text:style-name="P20">TypeScript (27.3%) </text:p>
            </text:list-item>
            <text:list-item>
              <text:p text:style-name="P20">Vue (16%) </text:p>
            </text:list-item>
            <text:list-item>
              <text:p text:style-name="P20">PHP (12.2%) </text:p>
            </text:list-item>
            <text:list-item>
              <text:p text:style-name="P20">Blade (7.4%) </text:p>
            </text:list-item>
            <text:list-item>
              <text:p text:style-name="P20">CSS (3.8%) </text:p>
            </text:list-item>
          </text:list>
        </text:list-item>
        <text:list-item>
          <text:p text:style-name="P20"><text:span text:style-name="Strong_20_Emphasis">Frameworks y herramientas:</text:span> </text:p>
          <text:list>
            <text:list-item>
              <text:p text:style-name="P20">Laravel (supuesto por el uso de PHP y Blade) </text:p>
            </text:list-item>
            <text:list-item>
              <text:p text:style-name="P20">Vue.js </text:p>
            </text:list-item>
            <text:list-item>
              <text:p text:style-name="P20">Node.js (npm o yarn para gestión de paquetes) </text:p>
            </text:list-item>
            <text:list-item>
              <text:p text:style-name="P19">Composer (gestor de dependencias PHP) </text:p>
            </text:list-item>
          </text:list>
        </text:list-item>
      </text:list>
      <text:h text:style-name="Heading_20_2" text:outline-level="2"><text:span text:style-name="T1">2</text:span>. Descripción del Sistema</text:h>
      <text:p text:style-name="Text_20_body">“El sistema Lufra-2020” es una aplicación web desarrollada como proyecto académico. Presenta una arquitectura de frontend moderno (Vue.js/JavaScript/TypeScript) que interactúa con un backend robusto (PHP/Laravel). La app está diseñada para ejecutarse en un entorno de servidor web local en desarrollo o en servidores de producción compatibles.</text:p>
      <text:p text:style-name="Text_20_body"/>
      <text:h text:style-name="Heading_20_2" text:outline-level="2">3. Requisitos del Sistema</text:h>
      <text:h text:style-name="Heading_20_3" text:outline-level="3">3.1 Requisitos de Hardware</text:h>
      <text:list text:style-name="L2">
        <text:list-item>
          <text:p text:style-name="P23">Procesador: 1 GHz o superior </text:p>
        </text:list-item>
        <text:list-item>
          <text:p text:style-name="P23">RAM: al menos 2 GB </text:p>
        </text:list-item>
        <text:list-item>
          <text:p text:style-name="P22">Espacio en disco: mínimo 500 MB libres </text:p>
        </text:list-item>
      </text:list>
      <text:h text:style-name="Heading_20_3" text:outline-level="3">3.2 Requisitos de Software</text:h>
      <text:list text:style-name="L3">
        <text:list-item>
          <text:p text:style-name="P25"><text:span text:style-name="Strong_20_Emphasis">Servidor web:</text:span> Apache o Nginx </text:p>
        </text:list-item>
        <text:list-item>
          <text:p text:style-name="P25"><text:span text:style-name="Strong_20_Emphasis">PHP:</text:span> Versión 7.4 o superior </text:p>
        </text:list-item>
        <text:list-item>
          <text:p text:style-name="P25"><text:span text:style-name="Strong_20_Emphasis">Composer:</text:span> Última versión </text:p>
        </text:list-item>
        <text:list-item>
          <text:p text:style-name="P25"><text:span text:style-name="Strong_20_Emphasis">Node.js y npm:</text:span> Node.js v14 o superior, npm v6 o superior (o Yarn) </text:p>
        </text:list-item>
        <text:list-item>
          <text:p text:style-name="P24"><text:span text:style-name="Strong_20_Emphasis">Base de datos:</text:span> MySQL/MariaDB (según configuración) </text:p>
        </text:list-item>
      </text:list>
      <text:p text:style-name="Text_20_body"/>
      <text:h text:style-name="Heading_20_2" text:outline-level="2"><text:soft-page-break/>4. Instalación del Sistema</text:h>
      <text:h text:style-name="Heading_20_3" text:outline-level="3">4.1 Clonar el repositorio</text:h>
      <text:list text:style-name="L4">
        <text:list-item>
          <text:p text:style-name="P26">Abre una terminal y ejecuta: </text:p>
          <text:p text:style-name="P27"><text:bookmark text:name="_r_vo_"/>Code</text:p>
        </text:list-item>
      </text:list>
      <text:list text:style-name="L5">
        <text:list-item>
          <text:p text:style-name="P1"><text:span text:style-name="Source_20_Text">git clone https://github.com/UPTP-336-Proyecto-II/Lufra-2020.git</text:span></text:p>
        </text:list-item>
      </text:list>
      <text:list text:style-name="L6">
        <text:list-item>
          <text:p text:style-name="P28">Ingresa al directorio del proyecto: </text:p>
        </text:list-item>
      </text:list>
      <text:p text:style-name="P17"><text:bookmark text:name="_r_vu_"/>Code</text:p>
      <text:list text:style-name="L7">
        <text:list-item text:start-value="2">
          <text:p text:style-name="P2"><text:span text:style-name="Source_20_Text">cd Lufra-2020</text:span></text:p>
        </text:list-item>
      </text:list>
      <text:h text:style-name="Heading_20_3" text:outline-level="3">4.2 Instalar dependencias de backend (PHP)</text:h>
      <text:list text:style-name="L8">
        <text:list-item>
          <text:p text:style-name="P29">Asegúrate de tener Composer instalado. </text:p>
        </text:list-item>
        <text:list-item>
          <text:p text:style-name="P29">Ejecuta: </text:p>
          <text:p text:style-name="P30"><text:bookmark text:name="_r_104_"/>Code</text:p>
        </text:list-item>
      </text:list>
      <text:list text:style-name="L9">
        <text:list-item text:start-value="2">
          <text:p text:style-name="P3"><text:span text:style-name="Source_20_Text">composer install</text:span></text:p>
        </text:list-item>
      </text:list>
      <text:h text:style-name="Heading_20_3" text:outline-level="3">4.3 Instalar dependencias de frontend (Node.js)</text:h>
      <text:list text:style-name="L10">
        <text:list-item>
          <text:p text:style-name="P31">Asegúrate de tener Node.js y npm (o yarn) instalados. </text:p>
        </text:list-item>
        <text:list-item>
          <text:p text:style-name="P31">Ejecuta: </text:p>
          <text:p text:style-name="P32"><text:bookmark text:name="_r_10a_"/>Code</text:p>
        </text:list-item>
      </text:list>
      <text:p text:style-name="P4"><text:span text:style-name="Source_20_Text">npm install</text:span></text:p>
      <text:p text:style-name="P21">o </text:p>
      <text:p text:style-name="P17"><text:bookmark text:name="_r_10g_"/>Code</text:p>
      <text:list text:style-name="L11">
        <text:list-item text:start-value="2">
          <text:p text:style-name="P5"><text:span text:style-name="Source_20_Text">yarn install</text:span></text:p>
        </text:list-item>
      </text:list>
      <text:h text:style-name="Heading_20_3" text:outline-level="3">4.4 Configuración de entorno</text:h>
      <text:list text:style-name="L12">
        <text:list-item>
          <text:p text:style-name="P33">Copia el archivo de ejemplo de variables de entorno:</text:p>
          <text:p text:style-name="P34"><text:bookmark text:name="_r_10m_"/>Code</text:p>
        </text:list-item>
      </text:list>
      <text:list text:style-name="L13">
        <text:list-item>
          <text:p text:style-name="P6"><text:span text:style-name="Source_20_Text">cp .env.example .env</text:span></text:p>
        </text:list-item>
      </text:list>
      <text:list text:style-name="L14">
        <text:list-item>
          <text:p text:style-name="P35">Edita el archivo <text:span text:style-name="Source_20_Text">.env</text:span> para configurar los siguientes parámetros:</text:p>
        </text:list-item>
      </text:list>
      <text:list text:style-name="L15">
        <text:list-item>
          <text:p text:style-name="P37"><text:span text:style-name="Strong_20_Emphasis">APP_NAME:</text:span> Nombre de la aplicación </text:p>
        </text:list-item>
        <text:list-item>
          <text:p text:style-name="P37"><text:span text:style-name="Strong_20_Emphasis">APP_URL:</text:span> URL de la app (por ejemplo, <text:a xlink:type="simple" xlink:href="http://localhost/" office:target-frame-name="_blank" xlink:show="new" text:style-name="Internet_20_link" text:visited-style-name="Visited_20_Internet_20_Link">http://localhost</text:a>) </text:p>
        </text:list-item>
        <text:list-item>
          <text:p text:style-name="P36"><text:span text:style-name="Strong_20_Emphasis">DB_CONNECTION, DB_HOST, DB_PORT, DB_DATABASE, DB_USERNAME, DB_PASSWORD:</text:span> Datos de conexión a la base de datos </text:p>
        </text:list-item>
      </text:list>
      <text:list text:style-name="L16">
        <text:list-item>
          <text:p text:style-name="P38">Genera la clave de la aplicación de Laravel:</text:p>
        </text:list-item>
      </text:list>
      <text:p text:style-name="P18"><text:bookmark text:name="_r_10s_"/>Code</text:p>
      <text:list text:style-name="L17">
        <text:list-item>
          <text:p text:style-name="P7"><text:span text:style-name="Source_20_Text">php artisan key:generate</text:span></text:p>
        </text:list-item>
      </text:list>
      <text:list text:style-name="L18">
        <text:list-item>
          <text:p text:style-name="P39"><text:soft-page-break/>Ejecuta las migraciones (si hay):</text:p>
        </text:list-item>
      </text:list>
      <text:p text:style-name="P17"><text:bookmark text:name="_r_112_"/>Code</text:p>
      <text:list text:style-name="L19">
        <text:list-item text:start-value="4">
          <text:p text:style-name="P8"><text:span text:style-name="Source_20_Text">php artisan migrate</text:span></text:p>
        </text:list-item>
      </text:list>
      <text:h text:style-name="Heading_20_3" text:outline-level="3">4.5 Compilación del Frontend</text:h>
      <text:p text:style-name="Text_20_body">Ejecuta:</text:p>
      <text:p text:style-name="P17"><text:bookmark text:name="_r_118_"/>Code</text:p>
      <text:p text:style-name="P4"><text:span text:style-name="Source_20_Text">npm run dev</text:span></text:p>
      <text:p text:style-name="Text_20_body">o</text:p>
      <text:p text:style-name="P17"><text:bookmark text:name="_r_11e_"/>Code</text:p>
      <text:p text:style-name="P4"><text:span text:style-name="Source_20_Text">yarn dev</text:span></text:p>
      <text:list text:style-name="L20">
        <text:list-item>
          <text:p text:style-name="P40">Si quieres compilar para producción, usa: </text:p>
          <text:p text:style-name="P41"><text:bookmark text:name="_r_11k_"/>Code</text:p>
        </text:list-item>
      </text:list>
      <text:p text:style-name="P4"><text:span text:style-name="Source_20_Text">npm run build</text:span></text:p>
      <text:p text:style-name="P21">o </text:p>
      <text:p text:style-name="P17"><text:bookmark text:name="_r_11q_"/>Code</text:p>
      <text:list text:style-name="L21">
        <text:list-item>
          <text:p text:style-name="P9"><text:span text:style-name="Source_20_Text">yarn build</text:span></text:p>
        </text:list-item>
      </text:list>
      <text:p text:style-name="Horizontal_20_Line"/>
      <text:h text:style-name="Heading_20_1" text:outline-level="1">5. Estructura de Archivos, Directorios y Módulos</text:h>
      <text:p text:style-name="Text_20_body"><text:span text:style-name="Strong_20_Emphasis">Nota:</text:span> Los nombres y descripciones de los módulos pueden necesitar ajuste según la estructura real del repositorio.</text:p>
      <text:list text:style-name="L35">
        <text:list-item>
          <text:p text:style-name="P56"><text:span text:style-name="Strong_20_Emphasis">/app</text:span><text:line-break/>Lógica principal del backend (controladores, modelos, políticas, etc.).</text:p>
        </text:list-item>
        <text:list-item>
          <text:p text:style-name="P56"><text:span text:style-name="Strong_20_Emphasis">/resources/views</text:span><text:line-break/>Plantillas Blade para la interfaz generada por Laravel.</text:p>
        </text:list-item>
        <text:list-item>
          <text:p text:style-name="P56"><text:span text:style-name="Strong_20_Emphasis">/resources/js</text:span><text:line-break/>Componentes front-end desarrollados con Vue.js u otra tecnología JS.</text:p>
        </text:list-item>
        <text:list-item>
          <text:p text:style-name="P56"><text:span text:style-name="Strong_20_Emphasis">/database/migrations</text:span><text:line-break/>Archivos para crear y modificar la estructura de la base de datos.</text:p>
        </text:list-item>
        <text:list-item>
          <text:p text:style-name="P56"><text:span text:style-name="Strong_20_Emphasis">/routes/web.php</text:span><text:line-break/>Define las rutas del sistema web (enrutamientos principales a los controladores).</text:p>
        </text:list-item>
        <text:list-item>
          <text:p text:style-name="P56"><text:span text:style-name="Strong_20_Emphasis">/public</text:span><text:line-break/>Archivos públicos (index.php, imágenes, JS y CSS compilados, favicon, etc.).</text:p>
        </text:list-item>
        <text:list-item>
          <text:p text:style-name="P56"><text:soft-page-break/><text:span text:style-name="Strong_20_Emphasis">/config</text:span><text:line-break/>Archivos de configuración de Laravel.</text:p>
        </text:list-item>
        <text:list-item>
          <text:p text:style-name="P56"><text:span text:style-name="Strong_20_Emphasis">/src (si existe)</text:span><text:line-break/>Código fuente adicional para frontend moderno (Vue/TypeScript).</text:p>
        </text:list-item>
      </text:list>
      <text:h text:style-name="Heading_20_3" text:outline-level="3">5.1 Módulos Principales (Ejemplo)</text:h>
      <text:list text:style-name="L36">
        <text:list-item>
          <text:p text:style-name="P57"><text:span text:style-name="Strong_20_Emphasis">Módulo de Gestión de Usuarios</text:span><text:line-break/>Permite el registro, inicio de sesión, edición, listado y eliminación de usuarios.</text:p>
        </text:list-item>
        <text:list-item>
          <text:p text:style-name="P57"><text:span text:style-name="Strong_20_Emphasis">Módulo de Administración de Productos o Recursos</text:span><text:line-break/>CRUD para productos, servicios o recursos principales de la aplicación.</text:p>
        </text:list-item>
        <text:list-item>
          <text:p text:style-name="P57"><text:span text:style-name="Strong_20_Emphasis">Módulo de Reportes</text:span><text:line-break/>Generación de informes sobre el uso del sistema, exportación a PDF o Excel.</text:p>
        </text:list-item>
        <text:list-item>
          <text:p text:style-name="P57"><text:span text:style-name="Strong_20_Emphasis">Módulo de Panel Administrativo</text:span><text:line-break/>Interfaz para usuarios administradores, gestión de tablas maestras y parámetros del sistema.</text:p>
        </text:list-item>
        <text:list-item>
          <text:p text:style-name="P57"><text:span text:style-name="Strong_20_Emphasis">Módulo de Integración y Notificaciones</text:span><text:line-break/>Gestión de notificaciones por correo o integraciones con otros sistemas (según configuración).</text:p>
        </text:list-item>
      </text:list>
      <text:p text:style-name="Quotations"><text:span text:style-name="Strong_20_Emphasis">Importante:</text:span> Corrige o agrega módulos según lo que observes en <text:span text:style-name="Source_20_Text">/app/Http/Controllers</text:span>, <text:span text:style-name="Source_20_Text">/resources/js/components</text:span> y otros directorios relevantes del proyecto.</text:p>
      <text:p text:style-name="Horizontal_20_Line"/>
      <text:h text:style-name="Heading_20_1" text:outline-level="1">6. Base de Datos</text:h>
      <text:h text:style-name="Heading_20_3" text:outline-level="3">6.1 Motor y Conexión</text:h>
      <text:list text:style-name="L37">
        <text:list-item>
          <text:p text:style-name="P59"><text:span text:style-name="Strong_20_Emphasis">Motor:</text:span> MySQL o MariaDB (por defecto en Laravel, ajustable en <text:span text:style-name="Source_20_Text">.env</text:span>) </text:p>
        </text:list-item>
        <text:list-item>
          <text:p text:style-name="P59"><text:span text:style-name="Strong_20_Emphasis">Configuración de conexión:</text:span><text:line-break/>Define los parámetros en <text:span text:style-name="Source_20_Text">.env</text:span>: </text:p>
          <text:list>
            <text:list-item>
              <text:p text:style-name="P59">DB_CONNECTION=mysql </text:p>
            </text:list-item>
            <text:list-item>
              <text:p text:style-name="P59">DB_HOST=127.0.0.1 </text:p>
            </text:list-item>
            <text:list-item>
              <text:p text:style-name="P59">DB_PORT=3306 </text:p>
            </text:list-item>
            <text:list-item>
              <text:p text:style-name="P59">DB_DATABASE=lufra_db (o el nombre asignado) </text:p>
            </text:list-item>
            <text:list-item>
              <text:p text:style-name="P59">DB_USERNAME=root (o tu usuario) </text:p>
            </text:list-item>
            <text:list-item>
              <text:p text:style-name="P58">DB_PASSWORD= (contraseña) </text:p>
            </text:list-item>
          </text:list>
        </text:list-item>
      </text:list>
      <text:h text:style-name="Heading_20_3" text:outline-level="3">6.2 Principales Tablas (Ejemplo basado en sistemas típicos)</text:h>
      <text:list text:style-name="L38">
        <text:list-item>
          <text:p text:style-name="P60"><text:span text:style-name="Strong_20_Emphasis">users</text:span><text:line-break/>Guarda usuarios del sistema (id, name, email, password, role, timestamps).</text:p>
        </text:list-item>
        <text:list-item>
          <text:p text:style-name="P60"><text:span text:style-name="Strong_20_Emphasis">productos</text:span><text:line-break/>Información de productos/servicios gestionados ([id], nombre, descripción, precio, etc.).</text:p>
        </text:list-item>
        <text:list-item>
          <text:p text:style-name="P60"><text:soft-page-break/><text:span text:style-name="Strong_20_Emphasis">orders (o pedidos/ventas)</text:span><text:line-break/>Registro de transacciones (id, user_id, producto_id, cantidad, estado, fecha).</text:p>
        </text:list-item>
        <text:list-item>
          <text:p text:style-name="P60"><text:span text:style-name="Strong_20_Emphasis">notifications</text:span><text:line-break/>Notificaciones internas para los usuarios.</text:p>
        </text:list-item>
      </text:list>
      <text:h text:style-name="Heading_20_3" text:outline-level="3">6.3 Migraciones</text:h>
      <text:p text:style-name="Text_20_body">Laravel gestiona la estructura de la base de datos con migraciones en <text:span text:style-name="Source_20_Text">/database/migrations</text:span>:</text:p>
      <text:p text:style-name="Text_20_body">Para aplicar la estructura en una base de datos nueva:</text:p>
      <text:p text:style-name="P17"><text:bookmark text:name="_r_14q_"/>Shell</text:p>
      <text:p text:style-name="P4"><text:span text:style-name="Source_20_Text">php artisan migrate</text:span></text:p>
      <text:h text:style-name="Heading_20_3" text:outline-level="3">6.4 Relaciones</text:h>
      <text:p text:style-name="Text_20_body">Suelen establecerse relaciones en los modelos:</text:p>
      <text:list text:style-name="L39">
        <text:list-item>
          <text:p text:style-name="P62">Un usuario puede tener muchos pedidos. </text:p>
        </text:list-item>
        <text:list-item>
          <text:p text:style-name="P61">Un pedido puede incluir uno o varios productos. </text:p>
        </text:list-item>
      </text:list>
      <text:p text:style-name="Horizontal_20_Line"/>
      <text:h text:style-name="Heading_20_1" text:outline-level="1">7. Estructura Interna y Flujo de Datos</text:h>
      <text:h text:style-name="Heading_20_2" text:outline-level="2">7.1 Ciclo típico de operación</text:h>
      <text:list text:style-name="L40">
        <text:list-item>
          <text:p text:style-name="P63"><text:span text:style-name="Strong_20_Emphasis">El usuario accede a la plataforma</text:span><text:line-break/>Se muestra la pantalla de login o el panel principal según el estado de sesión.</text:p>
        </text:list-item>
        <text:list-item>
          <text:p text:style-name="P63"><text:span text:style-name="Strong_20_Emphasis">Acceso a los módulos</text:span><text:line-break/>El frontend (Vue.js) realiza llamadas (AJAX o fetch) a los endpoints definidos en Laravel (rutas <text:span text:style-name="Source_20_Text">/api</text:span> o <text:span text:style-name="Source_20_Text">/web</text:span>).</text:p>
        </text:list-item>
        <text:list-item>
          <text:p text:style-name="P63"><text:span text:style-name="Strong_20_Emphasis">Procesamiento en backend</text:span><text:line-break/>Laravel recibe la petición, procesa la lógica (controlador → modelo → base de datos), y retorna la respuesta (generalmente JSON o vista Blade).</text:p>
        </text:list-item>
        <text:list-item>
          <text:p text:style-name="P63"><text:span text:style-name="Strong_20_Emphasis">Despliegue de información</text:span><text:line-break/>El frontend actualiza la interfaz usando los datos recibidos.</text:p>
        </text:list-item>
      </text:list>
      <text:h text:style-name="Heading_20_2" text:outline-level="2">7.2 Componentes de Comunicación</text:h>
      <text:list text:style-name="L41">
        <text:list-item>
          <text:p text:style-name="P65"><text:span text:style-name="Strong_20_Emphasis">Frontend:</text:span> Vue.js, TypeScript, JavaScript en <text:span text:style-name="Source_20_Text">/resources/js</text:span> o <text:span text:style-name="Source_20_Text">/src</text:span>. </text:p>
        </text:list-item>
        <text:list-item>
          <text:p text:style-name="P65"><text:span text:style-name="Strong_20_Emphasis">Backend:</text:span> Laravel (PHP), controladores en <text:span text:style-name="Source_20_Text">/app/Http/Controllers</text:span>. </text:p>
        </text:list-item>
        <text:list-item>
          <text:p text:style-name="P64"><text:span text:style-name="Strong_20_Emphasis">Base de datos:</text:span> ORM Eloquent, consultas y persistencia en modelos <text:span text:style-name="Source_20_Text">/app/Models</text:span> o <text:span text:style-name="Source_20_Text">/app</text:span>. </text:p>
        </text:list-item>
      </text:list>
      <text:h text:style-name="Heading_20_3" text:outline-level="3"><text:soft-page-break/>7.3 Rutas y Controladores</text:h>
      <text:list text:style-name="L42">
        <text:list-item>
          <text:p text:style-name="P67">Las rutas web están definidas en <text:span text:style-name="Source_20_Text">/routes/web.php</text:span>. </text:p>
        </text:list-item>
        <text:list-item>
          <text:p text:style-name="P67">Las rutas API (si existen) están en <text:span text:style-name="Source_20_Text">/routes/api.php</text:span>. </text:p>
        </text:list-item>
        <text:list-item>
          <text:p text:style-name="P66">Cada ruta apunta a un controlador que dirige el flujo de la aplicación. </text:p>
        </text:list-item>
      </text:list>
      <text:p text:style-name="Text_20_body"/>
      <text:p text:style-name="Horizontal_20_Line"/>
      <text:h text:style-name="Heading_20_2" text:outline-level="2">8. Actualización</text:h>
      <text:list text:style-name="L28">
        <text:list-item>
          <text:p text:style-name="P49">Para actualizar el proyecto a la última versión del repositorio remoto: </text:p>
          <text:p text:style-name="P50"><text:bookmark text:name="_r_12i_"/>Code</text:p>
        </text:list-item>
      </text:list>
      <text:list text:style-name="L29">
        <text:list-item>
          <text:p text:style-name="P12"><text:span text:style-name="Source_20_Text">git pull origin main</text:span></text:p>
        </text:list-item>
      </text:list>
      <text:list text:style-name="L30">
        <text:list-item>
          <text:p text:style-name="P51">Repite instalación de dependencias si es necesario: </text:p>
        </text:list-item>
      </text:list>
      <text:p text:style-name="P17"><text:bookmark text:name="_r_12o_"/>Code</text:p>
      <text:list text:style-name="L31">
        <text:list-item>
          <text:p text:style-name="P13"><text:span text:style-name="Source_20_Text">composer install</text:span></text:p>
          <text:p text:style-name="P14"><text:span text:style-name="Source_20_Text">npm install</text:span></text:p>
        </text:list-item>
      </text:list>
      <text:p text:style-name="Horizontal_20_Line"/>
      <text:h text:style-name="Heading_20_2" text:outline-level="2">9. Mantenimiento y Soporte</text:h>
      <text:list text:style-name="L32">
        <text:list-item>
          <text:p text:style-name="P52"><text:span text:style-name="Strong_20_Emphasis">Actualizaciones:</text:span> Mantén actualizado PHP, Node.js, Composer y los paquetes del sistema. </text:p>
        </text:list-item>
        <text:list-item>
          <text:p text:style-name="P52"><text:span text:style-name="Strong_20_Emphasis">Limpieza:</text:span> Borra caches y archivos temporales regularmente usando: </text:p>
          <text:p text:style-name="P53"><text:bookmark text:name="_r_12u_"/>Code</text:p>
        </text:list-item>
      </text:list>
      <text:list text:style-name="L33">
        <text:list-item>
          <text:p text:style-name="P15"><text:span text:style-name="Source_20_Text">php artisan cache:clear</text:span></text:p>
          <text:p text:style-name="P16"><text:span text:style-name="Source_20_Text">npm cache clean --force</text:span></text:p>
        </text:list-item>
        <text:list-item>
          <text:p text:style-name="P54"><text:span text:style-name="Strong_20_Emphasis">Soporte:</text:span> Reporta incidencias o consulta dudas en la sección “Issues” del repositorio GitHub. </text:p>
        </text:list-item>
      </text:list>
      <text:p text:style-name="Horizontal_20_Line"/>
      <text:h text:style-name="Heading_20_2" text:outline-level="2">10. Contacto</text:h>
      <text:list text:style-name="L34">
        <text:list-item>
          <text:p text:style-name="P55">Para soporte técnico, reportar bugs o solicitar características nuevas, utiliza el apartado Issues en el repositorio: <text:a xlink:type="simple" xlink:href="https://github.com/UPTP-336-Proyecto-II/Lufra-2020/issues" office:target-frame-name="_blank" xlink:show="new" text:style-name="Internet_20_link" text:visited-style-name="Visited_20_Internet_20_Link">https://github.com/UPTP-336-Proyecto-II/Lufra-2020/issues</text:a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1:10:46.476263113</meta:creation-date>
    <dc:date>2026-05-26T11:12:57.286674658</dc:date>
    <meta:editing-duration>PT2M14S</meta:editing-duration>
    <meta:editing-cycles>1</meta:editing-cycles>
    <meta:document-statistic meta:table-count="0" meta:image-count="0" meta:object-count="0" meta:page-count="6" meta:paragraph-count="148" meta:word-count="1021" meta:character-count="6687" meta:non-whitespace-character-count="5854"/>
    <meta:generator>LibreOffice/7.6.2.1$Linux_X86_64 LibreOffice_project/60$Build-1</meta:generator>
  </office:meta>
</office:document-meta>
</file>